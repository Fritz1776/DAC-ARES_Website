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292in" table:align="margins"/>
    </style:style>
    <style:style style:name="Table1.A" style:family="table-column">
      <style:table-column-properties style:column-width="7.0292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3868in"/>
    </style:style>
    <style:style style:name="P1" style:family="paragraph" style:parent-style-name="Standard">
      <style:text-properties officeooo:paragraph-rsid="0014ac57"/>
    </style:style>
    <style:style style:name="P2" style:family="paragraph" style:parent-style-name="Default_7e_LT_7e_Untertitel">
      <style:paragraph-properties fo:margin-left="0in" fo:margin-right="0in" fo:line-height="100%" fo:text-align="start" style:justify-single-word="false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text-properties officeooo:rsid="0014ac57" officeooo:paragraph-rsid="0014ac57"/>
    </style:style>
    <style:style style:name="P4" style:family="paragraph" style:parent-style-name="Standard">
      <style:text-properties officeooo:rsid="001b07d9" officeooo:paragraph-rsid="001b07d9"/>
    </style:style>
    <style:style style:name="P5" style:family="paragraph" style:parent-style-name="Standard">
      <style:text-properties fo:color="#000000" loext:opacity="100%" officeooo:rsid="00199dbb" officeooo:paragraph-rsid="00199dbb"/>
    </style:style>
    <style:style style:name="P6" style:family="paragraph" style:parent-style-name="Standard">
      <style:text-properties fo:color="#bf0041" loext:opacity="100%" officeooo:rsid="00199dbb" officeooo:paragraph-rsid="00199dbb"/>
    </style:style>
    <style:style style:name="P7" style:family="paragraph" style:parent-style-name="Standard">
      <style:text-properties officeooo:paragraph-rsid="00199dbb"/>
    </style:style>
    <style:style style:name="P8" style:family="paragraph" style:parent-style-name="Standard">
      <style:text-properties officeooo:rsid="00199dbb" officeooo:paragraph-rsid="00199dbb"/>
    </style:style>
    <style:style style:name="P9" style:family="paragraph" style:parent-style-name="Standard">
      <style:text-properties officeooo:rsid="0017673a" officeooo:paragraph-rsid="0017673a"/>
    </style:style>
    <style:style style:name="P10" style:family="paragraph" style:parent-style-name="Standard">
      <style:text-properties fo:font-size="14pt" officeooo:rsid="001cfec4" officeooo:paragraph-rsid="001cfec4" style:font-size-asian="14pt" style:font-size-complex="14pt"/>
    </style:style>
    <style:style style:name="P11" style:family="paragraph" style:parent-style-name="Table_20_Contents">
      <style:text-properties fo:font-size="20pt" style:font-size-asian="20pt" style:font-size-complex="20pt"/>
    </style:style>
    <style:style style:name="P12" style:family="paragraph" style:parent-style-name="Standard">
      <style:text-properties fo:font-size="13pt" officeooo:rsid="0014ac57" officeooo:paragraph-rsid="0014ac57" style:font-size-asian="13pt" style:font-size-complex="13pt"/>
    </style:style>
    <style:style style:name="T1" style:family="text">
      <style:text-properties officeooo:rsid="0014ac57"/>
    </style:style>
    <style:style style:name="T2" style:family="text">
      <style:text-properties officeooo:rsid="00193cb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Liberation Sans"/>
    </style:style>
    <style:style style:name="T5" style:family="text">
      <style:text-properties fo:color="#02295a" loext:opacity="100%"/>
    </style:style>
    <style:style style:name="T6" style:family="text">
      <style:text-properties officeooo:rsid="00199dbb"/>
    </style:style>
    <style:style style:name="T7" style:family="text">
      <style:text-properties officeooo:rsid="0015ba47"/>
    </style:style>
    <style:style style:name="T8" style:family="text">
      <style:text-properties fo:color="#bf0041" loext:opacity="100%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color="#bf0041" loext:opacity="100%"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fo:font-size="12pt" fo:font-style="normal" officeooo:rsid="00199dbb" style:font-size-asian="12pt" style:font-style-asian="normal" style:font-size-complex="12pt" style:font-style-complex="normal"/>
    </style:style>
    <style:style style:name="T13" style:family="text">
      <style:text-properties fo:color="#bf0041" loext:opacity="100%" fo:font-size="12pt" fo:font-style="normal" officeooo:rsid="00199dbb" style:font-size-asian="12pt" style:font-style-asian="normal" style:font-size-complex="12pt" style:font-style-complex="normal"/>
    </style:style>
    <style:style style:name="T14" style:family="text">
      <style:text-properties fo:color="#000000" loext:opacity="100%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000000" loext:opacity="100%" fo:font-size="11pt" fo:font-style="italic" officeooo:rsid="00199dbb" style:font-size-asian="11pt" style:font-style-asian="italic" style:font-size-complex="11pt" style:font-style-complex="italic"/>
    </style:style>
    <style:style style:name="T16" style:family="text">
      <style:text-properties officeooo:rsid="0017673a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wnload this </text:span><text:span text:style-name="T2">handout</text:span><text:span text:style-name="T1"> and/or the JS8Call Presentation:</text:span></text:p>
      <text:p text:style-name="P2" loext:marker-style-name="T3"><text:span text:style-name="T4">AREDN: <text:s/></text:span><text:span text:style-name="T5">\\NM5XD-NAS\AREDN_Public\MVRC Presentations</text:span></text:p>
      <text:p text:style-name="P2" loext:marker-style-name="T3"><text:span text:style-name="T4">Interwebs:</text:span><text:span text:style-name="T3"> </text:span><text:span text:style-name="T5">https://dac-ares.org/MVRC_Presentations</text:span></text:p>
      <text:p text:style-name="Standard"/>
      <text:p text:style-name="P3">Downloads <text:span text:style-name="T6">and additional info:</text:span></text:p>
      <text:p text:style-name="P3">JS8Call + Online user Guide: <text:s/><text:a xlink:type="simple" xlink:href="https://js8call.com/downloads.html" text:style-name="Internet_20_link" text:visited-style-name="Visited_20_Internet_20_Link">https://js8call.com/downloads.html</text:a></text:p>
      <text:p text:style-name="P3">CommStat <text:a xlink:type="simple" xlink:href="https://commstat.app/downloads.php" text:style-name="Internet_20_link" text:visited-style-name="Visited_20_Internet_20_Link">https://commstat.app/downloads.php</text:a></text:p>
      <text:p text:style-name="P3">JS8Spotter/JS8Reporter <text:a xlink:type="simple" xlink:href="https://kf7mix.com/js8spotter.html" text:style-name="Internet_20_link" text:visited-style-name="Visited_20_Internet_20_Link">https://kf7mix.com/js8spotter.html</text:a></text:p>
      <text:p text:style-name="P3">LM Studio <text:a xlink:type="simple" xlink:href="https://lmstudio.ai/" text:style-name="Internet_20_link" text:visited-style-name="Visited_20_Internet_20_Link">https://lmstudio.ai/</text:a></text:p>
      <text:p text:style-name="P3"><text:span text:style-name="T7">Partial list of JS8Call @groups </text:span><text:a xlink:type="simple" xlink:href="https://kf7mix.com/js8call_groups.html" text:style-name="Internet_20_link" text:visited-style-name="Visited_20_Internet_20_Link">https://kf7mix.com/js8call_groups.html</text:a></text:p>
      <text:p text:style-name="P3"/>
      <text:p text:style-name="P4">Short List of Groups: <text:span text:style-name="T8">(red = most active)</text:span></text:p>
      <text:p text:style-name="P5">@ARES <text:span text:style-name="T9">Nationwide ARES</text:span><text:tab/><text:tab/><text:tab/><text:span text:style-name="T8">@ARESNM </text:span><text:span text:style-name="T10">New Mexico ARES</text:span></text:p>
      <text:p text:style-name="P5"><text:span text:style-name="T11">@WX </text:span><text:span text:style-name="T9">General Weather Info</text:span><text:span text:style-name="T11"><text:tab/><text:tab/><text:tab/>@SKYWARN </text:span><text:span text:style-name="T9">NWS Skywarn Group</text:span></text:p>
      <text:p text:style-name="P5"><text:span text:style-name="T11">@EMCOMM</text:span><text:tab/><text:span text:style-name="T9">EmComm Calling Group</text:span><text:tab/><text:span text:style-name="T8">@AMRRON </text:span><text:span text:style-name="T10">Nationwide Persistent EmComm</text:span></text:p>
      <text:p text:style-name="P6">@GHOSTNET <text:span text:style-name="T9">US &amp; Worldwide EmComm</text:span><text:tab/>@GNUSANM <text:s/><text:span text:style-name="T9">New Mexico GhostNet</text:span></text:p>
      <text:p text:style-name="P7"><text:span text:style-name="T12">@JS8CHESS and </text:span><text:span text:style-name="T13">@JS8GAMES</text:span><text:span text:style-name="T12"> </text:span><text:span text:style-name="T14">Turn-based on the air </text:span><text:span text:style-name="T15">games contact </text:span><text:a xlink:type="simple" xlink:href="https://www.qrz.com/db/WA8WQU" text:style-name="Internet_20_link" text:visited-style-name="Visited_20_Internet_20_Link">WA8WQU</text:a><text:span text:style-name="T14"> </text:span></text:p>
      <text:p text:style-name="P8"/>
      <text:p text:style-name="P8"/>
      <text:p text:style-name="P9">Common JS8Call Frequencies:</text:p>
      <text:p text:style-name="P3">1.8435 MHz (160m)<text:tab/><text:tab/><text:tab/>3.5780 MHz (80m)<text:tab/><text:tab/><text:tab/>5.363<text:span text:style-name="T16">0</text:span> MHz (60m)</text:p>
      <text:p text:style-name="P3">7.078<text:span text:style-name="T16">0</text:span> MHz (40m)<text:tab/><text:tab/><text:tab/>10.130<text:span text:style-name="T16">0</text:span> MHz (30m)<text:tab/><text:tab/><text:tab/>14.078<text:span text:style-name="T16">0</text:span> MHz (20m)</text:p>
      <text:p text:style-name="P3">18.104<text:span text:style-name="T16">0</text:span> MHz (17m)<text:tab/><text:tab/><text:tab/>21.078<text:span text:style-name="T16">0</text:span> MHz (15m)<text:tab/><text:tab/><text:tab/>24.922<text:span text:style-name="T16">0</text:span> MHz (12m)</text:p>
      <text:p text:style-name="P3">28.0780 MHz (10m)<text:tab/><text:tab/><text:tab/>50.3180 MHz (6m)<text:tab/><text:tab/><text:tab/>144.1780 MHz (2m)</text:p>
      <text:p text:style-name="P3">7.1070 MHz (40m)<text:span text:style-name="T16">GhostNet<text:tab/></text:span><text:tab/>7.1100 MHz (40m)<text:span text:style-name="T16">EmComm<text:tab/>14.1100 MHz (40m)EmComm</text:span></text:p>
      <text:p text:style-name="P3"/>
      <text:p text:style-name="P3"/>
      <text:p text:style-name="P10"><text:span text:style-name="T17">Notes: </text:span><text:tab/><text:tab/><text:tab/><text:tab/><text:tab/> <text:span text:style-name="T18">...actually I just ran out of things to put on the handou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772in" fo:margin-bottom="0.3484in" fo:margin-left="0.6835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0T20:55:18.317370400</meta:creation-date>
    <meta:generator>LibreOffice/25.8.7.3$Windows_X86_64 LibreOffice_project/30742500f2d3eb4366ac312fa33d3dcabdb3eba5</meta:generator>
    <meta:editing-duration>PT18M17S</meta:editing-duration>
    <meta:editing-cycles>2</meta:editing-cycles>
    <meta:print-date>2026-07-10T20:55:37.815713900</meta:print-date>
    <dc:date>2026-07-10T21:13:31.094652000</dc:date>
    <meta:document-statistic meta:table-count="1" meta:image-count="0" meta:object-count="0" meta:page-count="1" meta:paragraph-count="22" meta:word-count="146" meta:character-count="1177" meta:non-whitespace-character-count="1022"/>
  </office:meta>
</office:document-meta>
</file>